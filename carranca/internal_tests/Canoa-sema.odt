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396b6" style:script-type="latin"/>
    </style:style>
    <style:style style:name="P2" style:family="paragraph" style:parent-style-name="Standard">
      <style:text-properties fo:language="en" fo:country="US" officeooo:rsid="000396b6" officeooo:paragraph-rsid="000396b6" style:script-type="latin"/>
    </style:style>
    <style:style style:name="P3" style:family="paragraph" style:parent-style-name="Standard">
      <style:text-properties fo:language="en" fo:country="US" officeooo:rsid="000396b6" officeooo:paragraph-rsid="00041a7c" style:script-type="latin"/>
    </style:style>
    <style:style style:name="P4" style:family="paragraph" style:parent-style-name="Standard">
      <style:text-properties fo:language="en" fo:country="US" officeooo:rsid="00041a7c" officeooo:paragraph-rsid="00041a7c" style:script-type="latin"/>
    </style:style>
    <style:style style:name="P5" style:family="paragraph" style:parent-style-name="Standard">
      <style:text-properties fo:language="en" fo:country="US" officeooo:rsid="00044ef2" officeooo:paragraph-rsid="00044ef2" style:script-type="latin"/>
    </style:style>
    <style:style style:name="P6" style:family="paragraph" style:parent-style-name="Standard">
      <style:paragraph-properties style:writing-mode="lr-tb" style:writing-mode-automatic="false"/>
      <style:text-properties fo:language="pt" fo:country="BR" officeooo:rsid="00044ef2" officeooo:paragraph-rsid="00044ef2" style:script-type="latin"/>
    </style:style>
    <style:style style:name="T1" style:family="text">
      <style:text-properties officeooo:rsid="000396b6"/>
    </style:style>
    <style:style style:name="T2" style:family="text">
      <style:text-properties officeooo:rsid="00041a7c"/>
    </style:style>
    <style:style style:name="T3" style:family="text">
      <style:text-properties officeooo:rsid="00044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core job of Canoa is to receive files from user via upload or download them from google drive.</text:span></text:p>
      <text:p text:style-name="P1"/>
      <text:p text:style-name="P1"><text:span text:style-name="T1">The file is a packed (zip) collection of spreadsheets. The process involves:</text:span></text:p>
      <text:p text:style-name="P1"/>
      <text:p text:style-name="P2">1. Receive the file</text:p>
      <text:p text:style-name="P2">2. Unzip on &lt;user-folder&gt;/data</text:p>
      <text:p text:style-name="P3">3. Call data validate, with arguments of the input folder name and output folder name &lt;user-folder&gt;/<text:span text:style-name="T2">report</text:span></text:p>
      <text:p text:style-name="P2">4. Wait for the process <text:span text:style-name="T2">to</text:span> finish, get the result of the validation <text:span text:style-name="T2">(</text:span>a PDF file<text:span text:style-name="T2">)</text:span> <text:span text:style-name="T2">send it via email.</text:span></text:p>
      <text:p text:style-name="P4">5. Clean up the folders.</text:p>
      <text:p text:style-name="P4"/>
      <text:p text:style-name="P4">This works ‘like a clock’. As the last part of this mechanism, I want to create a ‘signal’ so the user cannot send other file while there is one processing. Of course, I take care of possible errors that may occur in any of the 5 steps.</text:p>
      <text:p text:style-name="P4"/>
      <text:p text:style-name="P4">I like to here your opinion, before I share mine ;—)</text:p>
      <text:p text:style-name="P4"/>
      <text:p text:style-name="P2"><text:span text:style-name="T3">Canoa is a Python/Flask app</text:span></text:p>
      <text:p text:style-name="P5">The data_validation process is started as:</text:p>
      <text:p text:style-name="P5"/>
      <text:p text:style-name="P5">async def run_validator(</text:p>
      <text:p text:style-name="P5"><text:s text:c="4"/>:</text:p>
      <text:p text:style-name="P5"><text:s text:c="8"/>process = await asyncio.create_subprocess_exec(</text:p>
      <text:p text:style-name="P5"><text:s text:c="12"/>*run_command, stdout=asyncio.subprocess.PIPE, stderr=asyncio.subprocess.PIPE</text:p>
      <text:p text:style-name="P5"><text:s text:c="8"/>)</text:p>
      <text:p text:style-name="P5">:<text:line-break/><text:line-break/><text:line-break/> <text:s text:c="7"/>std_out_str, std_err_str, exit_code = asyncio.run(</text:p>
      <text:p text:style-name="P5">run_validator(</text:p>
      <text:p text:style-name="P5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9T17:25:40.707376600</meta:creation-date>
    <dc:date>2026-06-19T18:55:51.974493600</dc:date>
    <meta:editing-duration>PT23M23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" meta:paragraph-count="18" meta:word-count="169" meta:character-count="1066" meta:non-whitespace-character-count="874"/>
  </office:meta>
</office:document-meta>
</file>